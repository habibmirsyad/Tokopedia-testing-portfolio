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90000029CA679E194.png" manifest:media-type="image/png"/>
  <manifest:file-entry manifest:full-path="Pictures/10000001000005F2000002B4767C1B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2.5992in"/>
    </style:style>
    <style:style style:name="co4" style:family="table-column">
      <style:table-column-properties fo:break-before="auto" style:column-width="2.7665in"/>
    </style:style>
    <style:style style:name="co5" style:family="table-column">
      <style:table-column-properties fo:break-before="auto" style:column-width="3.811in"/>
    </style:style>
    <style:style style:name="co6" style:family="table-column">
      <style:table-column-properties fo:break-before="auto" style:column-width="2.8571in"/>
    </style:style>
    <style:style style:name="co7" style:family="table-column">
      <style:table-column-properties fo:break-before="auto" style:column-width="1.9638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4.2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4472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ro5" style:family="table-row">
      <style:table-row-properties style:row-height="0.8047in" fo:break-before="auto" style:use-optimal-row-height="true"/>
    </style:style>
    <style:style style:name="ro6" style:family="table-row">
      <style:table-row-properties style:row-height="0.4909in" fo:break-before="auto" style:use-optimal-row-height="true"/>
    </style:style>
    <style:style style:name="ro7" style:family="table-row">
      <style:table-row-properties style:row-height="1.2882in" fo:break-before="auto" style:use-optimal-row-height="true"/>
    </style:style>
    <style:style style:name="ro8" style:family="table-row">
      <style:table-row-properties style:row-height="0.9701in" fo:break-before="auto" style:use-optimal-row-height="true"/>
    </style:style>
    <style:style style:name="ro9" style:family="table-row">
      <style:table-row-properties style:row-height="1.1291in" fo:break-before="auto" style:use-optimal-row-height="true"/>
    </style:style>
    <style:style style:name="ro10" style:family="table-row">
      <style:table-row-properties style:row-height="1.7654in" fo:break-before="auto" style:use-optimal-row-height="tru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0.811in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style:font-name-complex="Ari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wrap-option="wrap" style:vertical-align="middl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6d6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="0.74pt solid #000000" style:vertical-align="middle"/>
    </style:style>
    <style:style style:name="ce67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fo:wrap-option="wrap" fo:border="0.74pt solid #000000"/>
    </style:style>
    <style:style style:name="ce72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2756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TC-01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email</text:p>
          </table:table-cell>
          <table:table-cell table:style-name="ce10" office:value-type="string" calcext:value-type="string">
            <text:p>berhasil masuk ke halaman register <text:s/>(https://www.tokopedia.com/register)</text:p>
          </table:table-cell>
          <table:table-cell table:style-name="ce50" office:value-type="string" calcext:value-type="string">
            <text:p>1. masukan email yang valid</text:p>
            <text:p>2. tekan “Daftar”</text:p>
            <text:p>3. tekan “Ya, Benar”</text:p>
            <text:p>4. buka mail yang telah dimasukkan sebelumnya</text:p>
            <text:p>5. ingat atau copy kode aktivasi akun</text:p>
            <text:p>6. buka kembali tokopedia dan masukan kode aktivasinya (OTP)</text:p>
            <text:p>7. masukkan nama lengkap dan kata sandi</text:p>
            <text:p>8. tekan “Lanjut”</text:p>
          </table:table-cell>
          <table:table-cell table:style-name="ce19" office:value-type="string" calcext:value-type="string">
            <text:p><text:span text:style-name="T1">1. email valid (ex: akun@gmail.com)</text:span></text:p>
            <text:p><text:span text:style-name="T1">2. 6 digit kode aktivasi dari email</text:span></text:p>
            <text:p><text:span text:style-name="T1">3. Nama Kamu</text:span></text:p>
            <text:p><text:span text:style-name="T1">4. password (ex: Password@123)</text:span>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2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daftar akun baru dengan akun google</text:p>
          </table:table-cell>
          <table:table-cell table:style-name="ce10" office:value-type="string" calcext:value-type="string">
            <text:p>memiliki akun google yang sudah terhubung ke browser yang digunakan (sudah login)</text:p>
          </table:table-cell>
          <table:table-cell table:style-name="ce50" office:value-type="string" calcext:value-type="string">
            <text:p>1. tekan Google</text:p>
            <text:p>2. pilih akun yang ingin digunakan</text:p>
          </table:table-cell>
          <table:table-cell table:style-name="ce19" office:value-type="string" calcext:value-type="string">
            <text:p>1. akun google terdaftar</text:p>
          </table:table-cell>
          <table:table-cell table:style-name="ce15" office:value-type="string" calcext:value-type="string">
            <text:p>sistem berhasil membuat akun baru dengan data yang sesuai</text:p>
          </table:table-cell>
          <table:table-cell table:style-name="ce15" office:value-type="string" calcext:value-type="string">
            <text:p>user berhasil terdaftar dengan status sudah login dan dialihkan ke ha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4" office:value-type="string" calcext:value-type="string">
            <text:p>TC-03</text:p>
          </table:table-cell>
          <table:table-cell table:style-name="ce7" office:value-type="string" calcext:value-type="string">
            <text:p>Negative</text:p>
          </table:table-cell>
          <table:table-cell table:style-name="ce4" office:value-type="string" calcext:value-type="string">
            <text:p>daftar dengan format email tidak valid</text:p>
          </table:table-cell>
          <table:table-cell table:style-name="ce10" office:value-type="string" calcext:value-type="string">
            <text:p>berhasil masuk ke halaman register (https://www.tokopedia.com/register)</text:p>
          </table:table-cell>
          <table:table-cell table:style-name="ce51" office:value-type="string" calcext:value-type="string">
            <text:p>1. masukkan email </text:p>
          </table:table-cell>
          <table:table-cell table:style-name="ce20" office:value-type="string" calcext:value-type="string">
            <text:p>1. format email tidak valid (ex: akun.com)</text:p>
          </table:table-cell>
          <table:table-cell table:style-name="ce15" office:value-type="string" calcext:value-type="string">
            <text:p>sistem tidak menerima email karena tidak sesuai format penulisan</text:p>
          </table:table-cell>
          <table:table-cell table:style-name="ce15" office:value-type="string" calcext:value-type="string">
            <text:p>muncul pesan error “Format email salah” dan tombol “Daftar” tidak bisa ditekan (disable)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4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akun dengan password kurang dari 8 character</text:p>
          </table:table-cell>
          <table:table-cell table:style-name="ce10" office:value-type="string" calcext:value-type="string">
            <text:p>user sudah memasukkan email valid dan sudah mengisi kode verifikasi OTP</text:p>
          </table:table-cell>
          <table:table-cell table:style-name="ce50" office:value-type="string" calcext:value-type="string">
            <text:p>1. masukkan nama lengkap</text:p>
            <text:p>2. masukkan password kurang dari 8 character</text:p>
          </table:table-cell>
          <table:table-cell table:style-name="ce19" office:value-type="string" calcext:value-type="string">
            <text:p>1. Nama Kamu</text:p>
            <text:p>2. password &lt; 8 angka (ex: 1234567, 321, dll)</text:p>
          </table:table-cell>
          <table:table-cell table:style-name="ce15" office:value-type="string" calcext:value-type="string">
            <text:p>sistem tidak menerima password karena jumlah character ada di bawah standar kemanan</text:p>
          </table:table-cell>
          <table:table-cell table:style-name="ce15" office:value-type="string" calcext:value-type="string">
            <text:p>muncul pesan error “Kata sandi baru terlalu pendek, minimum 8 karakter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6">
          <table:table-cell table:style-name="ce4" office:value-type="string" calcext:value-type="string">
            <text:p>TC-05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Daftar menggunakan kode OTP yang salah untuk verifikasi akun</text:p>
          </table:table-cell>
          <table:table-cell table:style-name="ce10" office:value-type="string" calcext:value-type="string">
            <text:p>user sudah memasukkan email yang valid dan berada di halaman verifikasi akun dengan OTP</text:p>
          </table:table-cell>
          <table:table-cell table:style-name="ce51" office:value-type="string" calcext:value-type="string">
            <text:p>1. masukkan 6 digit kode OTP yang berbeda dari OTP asli</text:p>
          </table:table-cell>
          <table:table-cell table:style-name="ce19" office:value-type="string" calcext:value-type="string">
            <text:p>1. 123456</text:p>
          </table:table-cell>
          <table:table-cell table:style-name="ce15" office:value-type="string" calcext:value-type="string">
            <text:p>sistem menolak OTP karena salah</text:p>
          </table:table-cell>
          <table:table-cell table:style-name="ce15" office:value-type="string" calcext:value-type="string">
            <text:p>muncul pop up error “Kode yang kamu masukkan salah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7">
          <table:table-cell table:style-name="ce4" office:value-type="string" calcext:value-type="string">
            <text:p>TC-06</text:p>
          </table:table-cell>
          <table:table-cell table:style-name="ce7" office:value-type="string" calcext:value-type="string">
            <text:p>Positive</text:p>
          </table:table-cell>
          <table:table-cell table:style-name="ce4" office:value-type="string" calcext:value-type="string">
            <text:p>Login ke akun terdaftar</text:p>
          </table:table-cell>
          <table:table-cell table:style-name="ce10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50" office:value-type="string" calcext:value-type="string">
            <text:p>1. tekan tombol “Masuk”</text:p>
            <text:p>2. masukkan email tokopedia yang sudah terdaftar</text:p>
            <text:p>3. tekan “Selanjutnya”</text:p>
            <text:p>4. masukkan kata sandi</text:p>
            <text:p>5. tekan “Masuk”</text:p>
            <text:p><text:span text:style-name="T1">6. buka mail yang telah dimasukkan sebelumnya</text:span></text:p>
            <text:p><text:span text:style-name="T1">7. ingat atau copy kode OTP dari tokopedia</text:span></text:p>
            <text:p><text:span text:style-name="T1">8. buka kembali tokopedia dan masukan kode OTP</text:span></text:p>
          </table:table-cell>
          <table:table-cell table:style-name="ce19" office:value-type="string" calcext:value-type="string">
            <text:p>1. email valid (ex: akun@gmail.com)</text:p>
            <text:p>2. password (ex: Password123)</text:p>
          </table:table-cell>
          <table:table-cell table:style-name="ce15" office:value-type="string" calcext:value-type="string">
            <text:p>Sistem menyinkronkan user dengan data yang tepat</text:p>
          </table:table-cell>
          <table:table-cell table:style-name="ce15" office:value-type="string" calcext:value-type="string">
            <text:p>user berhasil masuk dengan akun yang susai dan diarahkan ke laman utam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7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login menggunakan email yang belum terdaftar</text:p>
          </table:table-cell>
          <table:table-cell table:style-name="ce10" office:value-type="string" calcext:value-type="string">
            <text:p>berhasil masuk ke halaman utama tokopedia (<text:a xlink:href="https://www.tokopedia.com/" xlink:type="simple">https://www.tokopedia.com</text:a>)</text:p>
          </table:table-cell>
          <table:table-cell table:style-name="ce50" office:value-type="string" calcext:value-type="string">
            <text:p>1. tekan tombol “Masuk”</text:p>
            <text:p>2. masukkan email yang belum pernah didaftarkan</text:p>
          </table:table-cell>
          <table:table-cell table:style-name="ce19" office:value-type="string" calcext:value-type="string">
            <text:p>1. email yang belum terdaftar (ex: <text:a xlink:href="mailto:blmDaftar@gmail.com" xlink:type="simple">blmDaftar@gmail.com</text:a>)</text:p>
          </table:table-cell>
          <table:table-cell table:style-name="ce15" office:value-type="string" calcext:value-type="string">
            <text:p>sistem tidak meminta password karena email yang dimasukkan belum terdaftar di tokopedia</text:p>
          </table:table-cell>
          <table:table-cell table:style-name="ce15" office:value-type="string" calcext:value-type="string">
            <text:p>muncul pop up “Email belum terdaftar” dan sistem menawarkan untuk mendaftar akun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8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mencari barang dengan kolom pencarian</text:p>
          </table:table-cell>
          <table:table-cell table:style-name="ce10" office:value-type="string" calcext:value-type="string">
            <text:p>berhasil masuk ke <text:a xlink:href="https://tokopedia.com/" xlink:type="simple">https://tokopedia.com</text:a></text:p>
          </table:table-cell>
          <table:table-cell table:style-name="ce50" office:value-type="string" calcext:value-type="string">
            <text:p>1. masukkan nama barang yang ingin dicari di kolom pencarian</text:p>
            <text:p>2. tekan “Enter” di keyboard atau pilih rekomendasi kata yang sesuai pada kolom pencarian</text:p>
          </table:table-cell>
          <table:table-cell table:style-name="ce19" office:value-type="string" calcext:value-type="string">
            <text:p>1. nama barang yang ingin dicari (ex: laptop)</text:p>
          </table:table-cell>
          <table:table-cell table:style-name="ce15" office:value-type="string" calcext:value-type="string">
            <text:p>sistem menampilkan barang yang paling sesuai dengan yang terisi di kolom pencarian</text:p>
          </table:table-cell>
          <table:table-cell table:style-name="ce15" office:value-type="string" calcext:value-type="string">
            <text:p>sistem menampilkan barang yang sesuai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4" office:value-type="string" calcext:value-type="string">
            <text:p>TC-09</text:p>
          </table:table-cell>
          <table:table-cell table:style-name="ce7" office:value-type="string" calcext:value-type="string">
            <text:p>Positive</text:p>
          </table:table-cell>
          <table:table-cell table:style-name="ce10" office:value-type="string" calcext:value-type="string">
            <text:p>filter pencarian barang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50" office:value-type="string" calcext:value-type="string">
            <text:p>1. pilih checkbox dan atau mengisi rentan harga yang diinginkan untuk melakukan filter</text:p>
          </table:table-cell>
          <table:table-cell table:style-name="ce19" office:value-type="string" calcext:value-type="string">
            <text:p>1. checkbox (ex: Kondisi = bekas, Penawaran = COD, Jenis toko = Mall, dsb)</text:p>
            <text:p>2. harga min-max yang ingin difilter (ex: minimal = 2.400.000, maximal = 2.500.000)</text:p>
          </table:table-cell>
          <table:table-cell table:style-name="ce15" office:value-type="string" calcext:value-type="string">
            <text:p>sistem menampilkan barang yang paling sesuai aturan filter yang dipilih</text:p>
          </table:table-cell>
          <table:table-cell table:style-name="ce15" office:value-type="string" calcext:value-type="string">
            <text:p>filter harga tidak sepenuhnya sesuai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4">
          <table:table-cell table:style-name="ce4" office:value-type="string" calcext:value-type="string">
            <text:p>TC-10</text:p>
          </table:table-cell>
          <table:table-cell table:style-name="ce8" office:value-type="string" calcext:value-type="string">
            <text:p>Negative</text:p>
          </table:table-cell>
          <table:table-cell table:style-name="ce11" office:value-type="string" calcext:value-type="string">
            <text:p>filter harga maksimal &lt; minimal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62" office:value-type="string" calcext:value-type="string">
            <text:p>1. masukkan harga minimal dan maksimal harga di bagian filter barang</text:p>
          </table:table-cell>
          <table:table-cell table:style-name="ce26" office:value-type="string" calcext:value-type="string">
            <text:p>Misal:</text:p>
            <text:p>1. minimal = 2.400.000</text:p>
            <text:p>2. maksimal = 2.000.000</text:p>
          </table:table-cell>
          <table:table-cell table:style-name="ce15" office:value-type="string" calcext:value-type="string">
            <text:p>sistem menolak atau tidak menampilkan apapun karena logic error</text:p>
          </table:table-cell>
          <table:table-cell table:style-name="ce15" office:value-type="string" calcext:value-type="string">
            <text:p>muncul pesan error “ Harga maksimum harus lebih besar dari harga minimum.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4">
          <table:table-cell table:style-name="ce5" office:value-type="string" calcext:value-type="string">
            <text:p>TC-11</text:p>
          </table:table-cell>
          <table:table-cell table:style-name="ce7" office:value-type="string" calcext:value-type="string">
            <text:p>Negative</text:p>
          </table:table-cell>
          <table:table-cell table:style-name="ce10" office:value-type="string" calcext:value-type="string">
            <text:p>memastikan tidak ada duplikat dalam pilihan filter lokasi</text:p>
          </table:table-cell>
          <table:table-cell table:style-name="ce10" office:value-type="string" calcext:value-type="string">
            <text:p>sedang menggunakan fitur pencarian barang</text:p>
          </table:table-cell>
          <table:table-cell table:style-name="ce50" office:value-type="string" calcext:value-type="string">
            <text:p>1. tekan tombol “Lihat selengkapnya” yang ada di filter lokasi</text:p>
            <text:p>2. gulir atau gunakan kolom pencarian lokasi untuk memastikan apakah ada duplikasi lokasi</text:p>
          </table:table-cell>
          <table:table-cell table:style-name="ce20" office:value-type="string" calcext:value-type="string">
            <text:p>1. kepulauan mentawai</text:p>
            <text:p>2. konawe kepulauan</text:p>
            <text:p>3. pariaman</text:p>
            <text:p>4. padang pariaman</text:p>
          </table:table-cell>
          <table:table-cell table:style-name="ce16" office:value-type="string" calcext:value-type="string">
            <text:p>sistem memiliki nama lokasi yang unik untuk menghindari ambiguitas</text:p>
          </table:table-cell>
          <table:table-cell table:style-name="ce16" office:value-type="string" calcext:value-type="string">
            <text:p>beberapa lokasi memiliki nama yang sama persis</text:p>
          </table:table-cell>
          <table:table-cell table:style-name="ce31" office:value-type="string" calcext:value-type="string">
            <text:p>Fail</text:p>
          </table:table-cell>
          <table:table-cell/>
        </table:table-row>
        <table:table-row table:style-name="ro6">
          <table:table-cell table:style-name="ce5" office:value-type="string" calcext:value-type="string">
            <text:p>TC-12</text:p>
          </table:table-cell>
          <table:table-cell table:style-name="ce9" office:value-type="string" calcext:value-type="string">
            <text:p>Positive</text:p>
          </table:table-cell>
          <table:table-cell table:style-name="ce5" office:value-type="string" calcext:value-type="string">
            <text:p>memasukkan barang ke keranjang</text:p>
          </table:table-cell>
          <table:table-cell table:style-name="ce12" office:value-type="string" calcext:value-type="string">
            <text:p>sudah login tokopedia</text:p>
          </table:table-cell>
          <table:table-cell table:style-name="ce53" office:value-type="string" calcext:value-type="string">
            <text:p>1. pilih barang yang diinginkan</text:p>
            <text:p>2. klik tombol “+ Keranjang” </text:p>
            <text:p>3. klik tombol “Lihat Keranjang”</text:p>
          </table:table-cell>
          <table:table-cell table:style-name="ce25" office:value-type="string" calcext:value-type="string">
            <text:p>Misal:</text:p>
            <text:p>1. smart band</text:p>
          </table:table-cell>
          <table:table-cell table:style-name="ce16" office:value-type="string" calcext:value-type="string">
            <text:p>barang yang ditambahkan akan berada di keranjang / wish list</text:p>
          </table:table-cell>
          <table:table-cell table:style-name="ce16" office:value-type="string" calcext:value-type="string">
            <text:p>barang yang dipilih ada di keranjang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5" office:value-type="string" calcext:value-type="string">
            <text:p>TC-13</text:p>
          </table:table-cell>
          <table:table-cell table:style-name="ce9" office:value-type="string" calcext:value-type="string">
            <text:p>Positive</text:p>
          </table:table-cell>
          <table:table-cell table:style-name="ce12" office:value-type="string" calcext:value-type="string">
            <text:p>memasukkan barang yang sama ke keranjang</text:p>
          </table:table-cell>
          <table:table-cell table:style-name="ce12" office:value-type="string" calcext:value-type="string">
            <text:p>1. sudah login tokopedia</text:p>
            <text:p>2. sudah memasukkan barang ke keranjang</text:p>
            <text:p>3. berada di halaman keranjang</text:p>
          </table:table-cell>
          <table:table-cell table:style-name="ce53" office:value-type="string" calcext:value-type="string">
            <text:p>1. cek jumlah barang yang ingin dibeli ulang di keranjang</text:p>
            <text:p>2. klik barang yang sebelumnya sudah ada di keranjang</text:p>
            <text:p>3. klik “+ Keranjang”</text:p>
            <text:p>4. klik “Lihat Keranjang”</text:p>
            <text:p>5. cek apakah jumlah barang bertambah</text:p>
          </table:table-cell>
          <table:table-cell table:style-name="ce24" office:value-type="string" calcext:value-type="string">
            <text:p>1. barang di keranjang (ex: <text:span text:style-name="T1">smart band)</text:span></text:p>
            <text:p><text:span text:style-name="T1">2. jumlah barang sebelum dan sesudah</text:span></text:p>
          </table:table-cell>
          <table:table-cell table:style-name="ce16" office:value-type="string" calcext:value-type="string">
            <text:p>kuantitas barang yang ada di keranjang akan bertambah (tidak membuat list barang baru) karena barang yang dipilih sama persis</text:p>
          </table:table-cell>
          <table:table-cell table:style-name="ce16" office:value-type="string" calcext:value-type="string">
            <text:p>kuantitas barang di keranjang bertambah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8">
          <table:table-cell table:style-name="ce5" office:value-type="string" calcext:value-type="string">
            <text:p>TC-14</text:p>
          </table:table-cell>
          <table:table-cell table:style-name="ce8" office:value-type="string" calcext:value-type="string">
            <text:p>Positive</text:p>
          </table:table-cell>
          <table:table-cell table:style-name="ce13" office:value-type="string" calcext:value-type="string">
            <text:p>memasukkan barang berbeda dari toko yang sama</text:p>
          </table:table-cell>
          <table:table-cell table:style-name="ce12" office:value-type="string" calcext:value-type="string">
            <text:p>1. sudah login tokopedia</text:p>
            <text:p>2. sudah memasukkan barang ke keranjang</text:p>
            <text:p>3. berada di halaman keranjang</text:p>
          </table:table-cell>
          <table:table-cell table:style-name="ce53" office:value-type="string" calcext:value-type="string">
            <text:p>1. pilih barang di keranjang</text:p>
            <text:p>2. klik [nama toko] dari barang itu</text:p>
            <text:p>3. pilih barang yang berbeda dari yang ada di keranjang tapi dari toko yang sama</text:p>
            <text:p>4. klik “+ Keranjang”</text:p>
            <text:p><text:span text:style-name="T1">5. klik “Lihat Keranjang”</text:span></text:p>
          </table:table-cell>
          <table:table-cell table:style-name="ce21" office:value-type="string" calcext:value-type="string">
            <text:p>1. barang di keranjang</text:p>
            <text:p>2. nama toko</text:p>
            <text:p>(ex: </text:p>
            <text:p>di keranjang = laptop A, </text:p>
            <text:p>Yang akan dimasukkan = laptop B)</text:p>
          </table:table-cell>
          <table:table-cell table:style-name="ce27" office:value-type="string" calcext:value-type="string">
            <text:p>sistem mengelompokkan barang karena berasal dari penjual yang sama</text:p>
          </table:table-cell>
          <table:table-cell table:style-name="ce27" office:value-type="string" calcext:value-type="string">
            <text:p>barang berhasil dikelompokkan berdasarkan toko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5">
          <table:table-cell table:style-name="ce5" office:value-type="string" calcext:value-type="string">
            <text:p>TC-15</text:p>
          </table:table-cell>
          <table:table-cell table:style-name="ce9" office:value-type="string" calcext:value-type="string">
            <text:p>Negative</text:p>
          </table:table-cell>
          <table:table-cell table:style-name="ce14" office:value-type="string" calcext:value-type="string">
            <text:p>membeli barang lebih banyak dari stok yang tersedia</text:p>
          </table:table-cell>
          <table:table-cell table:style-name="ce13" office:value-type="string" calcext:value-type="string">
            <text:p>1. sudah login tokopedia</text:p>
            <text:p>2. berhasil masuk halaman barang yang ingin dibeli</text:p>
          </table:table-cell>
          <table:table-cell table:style-name="ce62" office:value-type="string" calcext:value-type="string">
            <text:p>1. pada pilihan jumlah barang masukkan angka yang melebihi stok barang</text:p>
          </table:table-cell>
          <table:table-cell table:style-name="ce26" office:value-type="string" calcext:value-type="string">
            <text:p>1. barang yang ingin dibeli = 9999</text:p>
          </table:table-cell>
          <table:table-cell table:style-name="ce62" office:value-type="string" calcext:value-type="string">
            <text:p>sistem menolak input karena barang yang ingin dibeli melebihi stok yang tersedia</text:p>
          </table:table-cell>
          <table:table-cell table:style-name="ce29" office:value-type="string" calcext:value-type="string">
            <text:p>input ditolak, muncul pesan error “Max. pembelian barang ini [stok] item, kurangi pembelianmu, ya!”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9">
          <table:table-cell table:style-name="ce5" office:value-type="string" calcext:value-type="string">
            <text:p>TC-`16</text:p>
          </table:table-cell>
          <table:table-cell table:style-name="ce9" office:value-type="string" calcext:value-type="string">
            <text:p>Negative</text:p>
          </table:table-cell>
          <table:table-cell table:style-name="ce12" office:value-type="string" calcext:value-type="string">
            <text:p>memasukkan barang lebih dari sisa stok yang ada ke dalam keranjang</text:p>
          </table:table-cell>
          <table:table-cell table:style-name="ce12" office:value-type="string" calcext:value-type="string">
            <text:p>sudah memasukkan semua atau sebagian suatu barang yang ada ke dalam keranjang</text:p>
          </table:table-cell>
          <table:table-cell table:style-name="ce54" office:value-type="string" calcext:value-type="string">
            <text:p>1. pilih barang yang sama persis dengan yang ada di keranjang (bisa dipilih dari keranjang langsung)</text:p>
            <text:p>2. masukkan jumlah barang agar saat dijumlahkan dengan yang ada di keranjang akan memiliki nilai &gt; stok</text:p>
            <text:p><text:span text:style-name="T1">3. klik “+ Keranjang”</text:span></text:p>
          </table:table-cell>
          <table:table-cell table:style-name="ce24" office:value-type="string" calcext:value-type="string">
            <text:p>1. barang yang sama seperti yang ada di keranjang (ex: laptop, pc, motor, dsb<text:span text:style-name="T1">)</text:span></text:p>
            <text:p><text:span text:style-name="T1">2. total barang yang dibeli</text:span></text:p>
            <text:p><text:span text:style-name="T1">Misal:</text:span></text:p>
            <text:p><text:span text:style-name="T1">Stok = 11</text:span></text:p>
            <text:p><text:span text:style-name="T1">Barang di keranjang = 10</text:span></text:p>
            <text:p><text:span text:style-name="T1">Beli lagi = 2 atau 3 atau 4 atau ...dst</text:span></text:p>
          </table:table-cell>
          <table:table-cell table:style-name="ce16" office:value-type="string" calcext:value-type="string">
            <text:p>sistem menolak karena semua stok barang sudah ada di keranjang atau barang di keranjang + barang yang ingin dibeli &gt; stok</text:p>
          </table:table-cell>
          <table:table-cell table:style-name="ce16" office:value-type="string" calcext:value-type="string">
            <text:p>Barang ditolak, muncul pesan error “Stok barang ini sisa [stok] dan kamu sudah punya [total di keranjang] di keranjangmu. (98)”</text:p>
          </table:table-cell>
          <table:table-cell table:style-name="ce30" office:value-type="string" calcext:value-type="string">
            <text:p>Pass</text:p>
          </table:table-cell>
          <table:table-cell table:style-name="ce32"/>
        </table:table-row>
        <table:table-row table:style-name="ro3">
          <table:table-cell table:style-name="ce5" office:value-type="string" calcext:value-type="string">
            <text:p>TC-17</text:p>
          </table:table-cell>
          <table:table-cell table:style-name="ce41" office:value-type="string" calcext:value-type="string">
            <text:p>Negative</text:p>
          </table:table-cell>
          <table:table-cell table:style-name="ce41" office:value-type="string" calcext:value-type="string">
            <text:p>Membeli &lt;=0 barang</text:p>
          </table:table-cell>
          <table:table-cell table:style-name="ce12" office:value-type="string" calcext:value-type="string">
            <text:p>sudah login tokopedia</text:p>
          </table:table-cell>
          <table:table-cell table:style-name="ce55" office:value-type="string" calcext:value-type="string">
            <text:p>1. pilih barang</text:p>
            <text:p>2. ubah jumlah barang menjadi 0 atau -1 atau hapus angka yang ada di dalamnya</text:p>
          </table:table-cell>
          <table:table-cell table:style-name="ce25" office:value-type="string" calcext:value-type="string">
            <text:p>1. barang</text:p>
            <text:p>2. angka &lt;= 0 pada jumlah</text:p>
          </table:table-cell>
          <table:table-cell table:style-name="ce16" office:value-type="string" calcext:value-type="string">
            <text:p>sistem menolak karena tidak bisa membeli barang &lt; 1</text:p>
          </table:table-cell>
          <table:table-cell table:style-name="ce16" office:value-type="string" calcext:value-type="string">
            <text:p>sistem menolak dan memberikan pesan error “minimal pembelian produk ini adalah 1 barang”, angka otomatis kembali menjadi 1 saat user melakukan klik di mana saja</text:p>
          </table:table-cell>
          <table:table-cell table:style-name="ce30" office:value-type="string" calcext:value-type="string">
            <text:p>Pass</text:p>
          </table:table-cell>
          <table:table-cell/>
        </table:table-row>
        <table:table-row table:style-name="ro2" table:number-rows-repeated="2">
          <table:table-cell table:style-name="ce5"/>
          <table:table-cell table:number-columns-repeated="2"/>
          <table:table-cell table:style-name="ce17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2"/>
          <table:table-cell table:style-name="ce18"/>
          <table:table-cell table:style-name="ce24"/>
          <table:table-cell table:style-name="ce25"/>
          <table:table-cell table:style-name="ce9" table:number-columns-repeated="2"/>
          <table:table-cell table:number-columns-repeated="2"/>
        </table:table-row>
        <table:table-row table:style-name="ro2" table:number-rows-repeated="2">
          <table:table-cell table:style-name="ce5"/>
          <table:table-cell table:number-columns-repeated="2"/>
          <table:table-cell table:style-name="ce18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25" table:number-columns-repeated="2"/>
          <table:table-cell table:number-columns-repeated="4"/>
        </table:table-row>
        <table:table-row table:style-name="ro2" table:number-rows-repeated="2">
          <table:table-cell table:style-name="ce5"/>
          <table:table-cell table:number-columns-repeated="3"/>
          <table:table-cell table:style-name="ce25"/>
          <table:table-cell table:number-columns-repeated="5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ug report" table:style-name="ta2">
        <office:forms form:automatic-focus="false" form:apply-design-mode="false"/>
        <table:table-column table:style-name="co9" table:default-cell-style-name="ce81"/>
        <table:table-column table:style-name="co10" table:default-cell-style-name="ce69"/>
        <table:table-column table:style-name="co11" table:default-cell-style-name="ce67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bsite = https://www.tokopedia.com </text:p>
          </table:table-cell>
          <table:covered-table-cell table:number-columns-repeated="4" table:style-name="ce6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1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Filter harga tidak akura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table:style-name="ce71" office:value-type="string" calcext:value-type="string">
            <text:p>sebagian barang tidak mengikuti aturan filter harg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navsource=&amp;pmax=2000000&amp;pmin=2000000&amp;srp_component_id=04.06.00.00&amp;srp_page_id=&amp;srp_page_title=&amp;st=&amp;q=laptop" xlink:type="simple">Jual laptop | Tokopedia</text:a> </text:p>
          </table:table-cell>
          <table:table-cell table:number-columns-repeated="2"/>
        </table:table-row>
        <table:table-row table:style-name="ro10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0" draw:name="Image 1" draw:style-name="gr1" draw:text-style-name="P1" svg:width="3.7807in" svg:height="1.687in" svg:x="0in" svg:y="0in">
              <draw:image xlink:href="Pictures/10000001000005D90000029CA679E194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Google Chrome Version 147.0.7727.118 (Official Build) (64-bit)</text:p>
          </table:table-cell>
          <table:table-cell table:number-columns-repeated="2"/>
        </table:table-row>
        <table:table-row table:style-name="ro11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laptop pada search bar tokopedia</text:p>
            <text:p>2. filter harga menjadi max = 2.000.000 dan min = 2.000.000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Expected result</text:p>
          </table:table-cell>
          <table:table-cell table:style-name="ce71" office:value-type="string" calcext:value-type="string">
            <text:p>semua barang yang muncul hanya memiliki harga 2.000.000 karena nilai min == ma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table:style-name="ce71" office:value-type="string" calcext:value-type="string">
            <text:p>muncul harga yang berbeda dari nilai yang ada di filter harga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edium (berpengaruh pada fungsionalitas tapi tidak membuat crash)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riority</text:p>
          </table:table-cell>
          <table:table-cell office:value-type="string" calcext:value-type="string">
            <text:p>High (merusak kepercayaan dan pengalaman pengguna)</text:p>
          </table:table-cell>
          <table:table-cell table:number-columns-repeated="2"/>
        </table:table-row>
        <table:table-row table:style-name="ro11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table:style-name="ce71" office:value-type="string" calcext:value-type="string">
            <text:p>jika bug tidak muncul coba login terlebih dahulu atau aktifkan filter untuk lokasi Medan karena penjual berada di Medan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70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Category</text:p>
          </table:table-cell>
          <table:table-cell table:style-name="ce68" office:value-type="string" calcext:value-type="string">
            <text:p>Label</text:p>
          </table:table-cell>
          <table:table-cell table:style-name="ce68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4">
            <text:p>Bug 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UG-02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Duplikasi pada filter lokas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eported</text:p>
          </table:table-cell>
          <table:table-cell office:value-type="string" calcext:value-type="string">
            <text:p>Habib Muhammad Irsya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office:value-type="string" calcext:value-type="string">
            <text:p>07/mei/2026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Bug overview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ada filter lokasi ada beberapa nama lokasi yang sama pers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URL</text:p>
          </table:table-cell>
          <table:table-cell table:style-name="ce72" office:value-type="string" calcext:value-type="string">
            <text:p><text:a xlink:href="https://www.tokopedia.com/search?fcity=98%23520&amp;navsource=&amp;srp_component_id=02.01.00.00&amp;srp_page_id=&amp;srp_page_title=&amp;st=&amp;q=barang" xlink:type="simple">Jual barang | Tokopedia</text:a> </text:p>
          </table:table-cell>
          <table:table-cell table:number-columns-repeated="2"/>
        </table:table-row>
        <table:table-row table:style-name="ro10">
          <table:covered-table-cell/>
          <table:table-cell office:value-type="string" calcext:value-type="string">
            <text:p>Screenshot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>
            <draw:frame draw:z-index="1" draw:name="Image 2" draw:style-name="gr2" draw:text-style-name="P1" svg:width="3.7547in" svg:height="1.7374in" svg:x="0.0787in" svg:y="0.0154in">
              <draw:image xlink:href="Pictures/10000001000005F2000002B4767C1B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koped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perating System</text:p>
          </table:table-cell>
          <table:table-cell table:style-name="ce71" office:value-type="string" calcext:value-type="string">
            <text:p>Windows 11 Home Single Language 64-bi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table:style-name="ce71" office:value-type="string" calcext:value-type="string">
            <text:p>Google Chrome Version 147.0.7727.118 (Official Build) (64-bit)</text:p>
          </table:table-cell>
          <table:table-cell table:number-columns-repeated="2"/>
        </table:table-row>
        <table:table-row table:style-name="ro12">
          <table:table-cell office:value-type="string" calcext:value-type="string" table:number-columns-spanned="1" table:number-rows-spanned="3">
            <text:p>Bug details</text:p>
          </table:table-cell>
          <table:table-cell office:value-type="string" calcext:value-type="string">
            <text:p>Steps to reproduce</text:p>
          </table:table-cell>
          <table:table-cell table:style-name="ce71" office:value-type="string" calcext:value-type="string">
            <text:p>1. masukkan keyword apa saja (bebas) pada search bar tokopedia untuk menampilkan menu filter</text:p>
            <text:p>2. pada bagian filter lokasi tekan “Lihat Selengkapnya”</text:p>
            <text:p><text:span text:style-name="T1">3. ketikkan lokasi yang memiliki duplikasi seperti: pariaman, padang pariaman, mentawai, konawe, dll</text:span>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xpected result</text:p>
          </table:table-cell>
          <table:table-cell office:value-type="string" calcext:value-type="string">
            <text:p>setiap lokasi bersifat unik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ctual result</text:p>
          </table:table-cell>
          <table:table-cell office:value-type="string" calcext:value-type="string">
            <text:p>ada duplikasi nama lokasi yang identik sehingga membuat ambigu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Bug track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Low (tidak terlalu berpengaruh ke fungsional, lebih ke arah UI)</text:p>
          </table:table-cell>
          <table:table-cell table:number-columns-repeated="2"/>
        </table:table-row>
        <table:table-row table:style-name="ro11">
          <table:covered-table-cell/>
          <table:table-cell office:value-type="string" calcext:value-type="string">
            <text:p>Priority</text:p>
          </table:table-cell>
          <table:table-cell table:style-name="ce71" office:value-type="string" calcext:value-type="string">
            <text:p>Medium (cukup mengganggu dan agak membingungkan tapi bukan masalah yang terlalu besar sehingga tidak darurat)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1:48:35.21462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4:03:40</meta:creation-date>
    <dc:language>en-US</dc:language>
    <dc:date>2026-05-14T15:43:48.814924300</dc:date>
    <meta:editing-cycles>14</meta:editing-cycles>
    <meta:editing-duration>PT9H32M39S</meta:editing-duration>
    <meta:generator>LibreOffice/26.2.3.2$Windows_X86_64 LibreOffice_project/70e089b17412e4cb7773e41413306b17a2328c34</meta:generator>
    <meta:document-statistic meta:table-count="2" meta:cell-count="244" meta:object-count="2"/>
    <meta:user-defined meta:name="AppVersion">15.0000</meta:user-defined>
  </office:meta>
</office:document-meta>
</file>